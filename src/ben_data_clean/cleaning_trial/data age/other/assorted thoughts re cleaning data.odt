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368" officeooo:paragraph-rsid="00118368"/>
    </style:style>
    <style:style style:name="P2" style:family="paragraph" style:parent-style-name="Standard">
      <style:text-properties officeooo:rsid="0012448f" officeooo:paragraph-rsid="0012448f"/>
    </style:style>
    <style:style style:name="P3" style:family="paragraph" style:parent-style-name="Standard">
      <style:text-properties officeooo:rsid="00133e3e" officeooo:paragraph-rsid="00133e3e"/>
    </style:style>
    <style:style style:name="P4" style:family="paragraph" style:parent-style-name="Standard">
      <style:text-properties officeooo:rsid="001472ea" officeooo:paragraph-rsid="001472ea"/>
    </style:style>
    <style:style style:name="P5" style:family="paragraph" style:parent-style-name="Standard">
      <style:text-properties fo:font-weight="normal" officeooo:rsid="000598d4" officeooo:paragraph-rsid="001472ea" style:font-weight-asian="normal" style:font-weight-complex="normal"/>
    </style:style>
    <style:style style:name="T1" style:family="text">
      <style:text-properties fo:font-weight="bold" officeooo:rsid="000598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4.0</text:p>
      <text:p text:style-name="P1"/>
      <text:p text:style-name="P1">line 457 - does this fix actually do something we don't want</text:p>
      <text:p text:style-name="P1"/>
      <text:p text:style-name="P1">?line 483</text:p>
      <text:p text:style-name="P1"/>
      <text:p text:style-name="P1">line 622 is overall in keyword??</text:p>
      <text:p text:style-name="P1"/>
      <text:p text:style-name="P1">Can adapt code in future if format doesn't match format in patterns detected in code.</text:p>
      <text:p text:style-name="P1"/>
      <text:p text:style-name="P1"/>
      <text:p text:style-name="P3">v5</text:p>
      <text:p text:style-name="P3"/>
      <text:p text:style-name="P3">lines 283-290?</text:p>
      <text:p text:style-name="P3"/>
      <text:p text:style-name="P3">what is secondary median</text:p>
      <text:p text:style-name="P3"/>
      <text:p text:style-name="P3">Does it search for a key for the numbers?</text:p>
      <text:p text:style-name="P3"/>
      <text:p text:style-name="P3">lines 444-452</text:p>
      <text:p text:style-name="P3"/>
      <text:p text:style-name="P3"/>
      <text:p text:style-name="P3"/>
      <text:p text:style-name="P4">AT END - <text:span text:style-name="T1">rearrange columns so all flags at start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9T12:07:36.158000000</meta:creation-date>
    <dc:date>2026-06-17T10:22:17.869000000</dc:date>
    <meta:editing-duration>PT2H37M4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1" meta:word-count="64" meta:character-count="332" meta:non-whitespace-character-count="279"/>
  </office:meta>
</office:document-meta>
</file>