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bca" officeooo:paragraph-rsid="0003abca"/>
    </style:style>
    <style:style style:name="P2" style:family="paragraph" style:parent-style-name="Standard">
      <style:text-properties officeooo:rsid="000598d4" officeooo:paragraph-rsid="000598d4"/>
    </style:style>
    <style:style style:name="P3" style:family="paragraph" style:parent-style-name="Standard">
      <style:text-properties fo:font-weight="normal" officeooo:rsid="000598d4" officeooo:paragraph-rsid="0003abc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5 errors</text:p>
      <text:p text:style-name="P1"/>
      <text:p text:style-name="P1">number 72: did not pull group names; incorrectly stated group ranges were unspecified (they were, given the specification in the overall)</text:p>
      <text:p text:style-name="P1"/>
      <text:p text:style-name="P1">number 1: incorrectly stated dispersion not reported but it was (and SD value not pulled)</text:p>
      <text:p text:style-name="P1"/>
      <text:p text:style-name="P1">number 6: median and mean not pulled</text:p>
      <text:p text:style-name="P1"/>
      <text:p text:style-name="P1">overall range is inconsistently populated</text:p>
      <text:p text:style-name="P1"/>
      <text:p text:style-name="P1">number 19, 92: median not pulled</text:p>
      <text:p text:style-name="P1"/>
      <text:p text:style-name="P1">number 86: dispersion stated as not reported but original cell does contain range; also range values not pulled through.</text:p>
      <text:p text:style-name="P1"/>
      <text:p text:style-name="P1">number 89: range not pulled through</text:p>
      <text:p text:style-name="P1"/>
      <text:p text:style-name="P2">number 106: range not pulled through</text:p>
      <text:p text:style-name="P2"/>
      <text:p text:style-name="P2">number 10, 20: did not pull through name of group 1</text:p>
      <text:p text:style-name="P2"/>
      <text:p text:style-name="P2">number 82: incorrectly pulled name of group 2</text:p>
      <text:p text:style-name="P2"/>
      <text:p text:style-name="P2">number 10: group 1 - median not pulled; group 2 - LQR/UQR values incorrectly put in dispersion lower/upper unspecified</text:p>
      <text:p text:style-name="P2"/>
      <text:p text:style-name="P2">number 15: IQR bounds put as unspecified bounds for both groups</text:p>
      <text:p text:style-name="P2"/>
      <text:p text:style-name="P2">number 20: range numbers not pulled</text:p>
      <text:p text:style-name="P2"/>
      <text:p text:style-name="P2">number 50: median not pulled for group 2</text:p>
      <text:p text:style-name="P2"/>
      <text:p text:style-name="P2">number 56: median not pulled for both groups</text:p>
      <text:p text:style-name="P2"/>
      <text:p text:style-name="P2">number 75: IQR incorrectly stated as dispersion range unspecified for both groups</text:p>
      <text:p text:style-name="P1"/>
      <text:p text:style-name="P2">number 82: group 1 values placed in group 2 columns; group 2 values not pulled</text:p>
      <text:p text:style-name="P2"/>
      <text:p text:style-name="P2">number 90: median not pulled through for group 1</text:p>
      <text:p text:style-name="P2"/>
      <text:p text:style-name="P2">number 108: mean not pulled for group 1; IQR pulled to wrong column in group 2 (should be in IQR but is in unspecified)</text:p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9T15:31:01.793000000</meta:creation-date>
    <dc:date>2026-06-09T15:52:02.016000000</dc:date>
    <meta:editing-duration>PT39S</meta:editing-duration>
    <meta:editing-cycles>1</meta:editing-cycles>
    <meta:document-statistic meta:table-count="0" meta:image-count="0" meta:object-count="0" meta:page-count="1" meta:paragraph-count="20" meta:word-count="218" meta:character-count="1257" meta:non-whitespace-character-count="1059"/>
    <meta:generator>LibreOffice/7.1.2.2$Windows_X86_64 LibreOffice_project/8a45595d069ef5570103caea1b71cc9d82b2aae4</meta:generator>
  </office:meta>
</office:document-meta>
</file>