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381" officeooo:paragraph-rsid="00164381"/>
    </style:style>
    <style:style style:name="P2" style:family="paragraph" style:parent-style-name="Standard">
      <style:text-properties officeooo:rsid="00180f0c" officeooo:paragraph-rsid="00180f0c"/>
    </style:style>
    <style:style style:name="P3" style:family="paragraph" style:parent-style-name="Standard">
      <style:text-properties officeooo:rsid="0018c8c0" officeooo:paragraph-rsid="0018c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72: median and IQR may be specified once and the format the same for other subgroups. Also subgroups not listed in output</text:p>
      <text:p text:style-name="P1"/>
      <text:p text:style-name="P1">Number 2: no &gt;= 18 included at all; if format listed at the start, then number after is mean but noted as SD.</text:p>
      <text:p text:style-name="P1"/>
      <text:p text:style-name="P1">Number 16: median not pulled, as above with format first</text:p>
      <text:p text:style-name="P1"/>
      <text:p text:style-name="P1">Number 22: probably SD if one number given</text:p>
      <text:p text:style-name="P1"/>
      <text:p text:style-name="P2">Number 68: ~</text:p>
      <text:p text:style-name="P2"/>
      <text:p text:style-name="P2">Number 75: 2 groups but seen as overall group; IQR stated but not bounds</text:p>
      <text:p text:style-name="P1"/>
      <text:p text:style-name="P2">Number 79: SD not pulled?</text:p>
      <text:p text:style-name="P2"/>
      <text:p text:style-name="P2">Number 80: typo for UQR</text:p>
      <text:p text:style-name="P2"/>
      <text:p text:style-name="P2">Number 81: IQR and range reported but only IQR pulled</text:p>
      <text:p text:style-name="P2"/>
      <text:p text:style-name="P2">Number 84: as 80</text:p>
      <text:p text:style-name="P2"/>
      <text:p text:style-name="P2">Number 86: range not pulled</text:p>
      <text:p text:style-name="P2"/>
      <text:p text:style-name="P2">Number 88: 'average' yet pulled as mean</text:p>
      <text:p text:style-name="P2"/>
      <text:p text:style-name="P2">Number 89: range not pulled</text:p>
      <text:p text:style-name="P2"/>
      <text:p text:style-name="P2">Number 90: 2 groups but not pulled</text:p>
      <text:p text:style-name="P2"/>
      <text:p text:style-name="P2">Number 93: SD not pulled</text:p>
      <text:p text:style-name="P2"/>
      <text:p text:style-name="P2">Number 95: unspecified range not pulled</text:p>
      <text:p text:style-name="P2"/>
      <text:p text:style-name="P2">Number 102: +/- but stated as IQR</text:p>
      <text:p text:style-name="P2"/>
      <text:p text:style-name="P2">Number 104: median not pulled as mean stated</text:p>
      <text:p text:style-name="P2"/>
      <text:p text:style-name="P2">Number 106: range not puleld as SD</text:p>
      <text:p text:style-name="P2"/>
      <text:p text:style-name="P3">Number 88: subgroup correct but did not pull through average</text:p>
      <text:p text:style-name="P3"/>
      <text:p text:style-name="P3">Number 6, 14, 92 - incorrectly subgrouped</text:p>
      <text:p text:style-name="P3"/>
      <text:p text:style-name="P3">Number 108, 56, 6, 10, 15, 20 - incorrect group 1 name</text:p>
      <text:p text:style-name="P3"/>
      <text:p text:style-name="P3">Number 82 incorrect group 2 name</text:p>
      <text:p text:style-name="P3"/>
      <text:p text:style-name="P3">For correctly grouped, for several of them, much info did not pull through, pulled through to incorrect group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8T16:26:09.609000000</meta:creation-date>
    <dc:date>2026-06-08T17:49:19.627000000</dc:date>
    <meta:editing-duration>PT1H12M5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4" meta:word-count="215" meta:character-count="1134" meta:non-whitespace-character-count="943"/>
  </office:meta>
</office:document-meta>
</file>