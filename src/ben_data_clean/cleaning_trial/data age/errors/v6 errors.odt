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3ff" officeooo:paragraph-rsid="000dd3ff"/>
    </style:style>
    <style:style style:name="P2" style:family="paragraph" style:parent-style-name="Standard">
      <style:text-properties officeooo:rsid="000e849e" officeooo:paragraph-rsid="000e849e"/>
    </style:style>
    <style:style style:name="P3" style:family="paragraph" style:parent-style-name="Standard">
      <style:text-properties officeooo:rsid="000fab55" officeooo:paragraph-rsid="000fab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6 errors</text:p>
      <text:p text:style-name="P1"/>
      <text:p text:style-name="P2">number 14, 19: median not reported</text:p>
      <text:p text:style-name="P2"/>
      <text:p text:style-name="P2">number 82: is 2 subgroups but not reported as such</text:p>
      <text:p text:style-name="P2"/>
      <text:p text:style-name="P2">number 10: not pulled median for group 1, nor group 1 name</text:p>
      <text:p text:style-name="P2"/>
      <text:p text:style-name="P2">number 15: not pulled group 1-2 category</text:p>
      <text:p text:style-name="P2"/>
      <text:p text:style-name="P3">number 20: range not pulled for group 2, name not pulled for group 1</text:p>
      <text:p text:style-name="P3"/>
      <text:p text:style-name="P3">number 56, 90: median not pulled for group 1</text:p>
      <text:p text:style-name="P3"/>
      <text:p text:style-name="P3">number 108: not pulled mean for group 1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9T17:28:46.811000000</meta:creation-date>
    <dc:date>2026-06-09T17:49:18.936000000</dc:date>
    <meta:editing-duration>PT9M41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8" meta:word-count="68" meta:character-count="342" meta:non-whitespace-character-count="282"/>
  </office:meta>
</office:document-meta>
</file>