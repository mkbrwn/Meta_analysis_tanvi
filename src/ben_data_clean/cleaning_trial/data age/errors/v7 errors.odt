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64f" officeooo:paragraph-rsid="0010064f"/>
    </style:style>
    <style:style style:name="P2" style:family="paragraph" style:parent-style-name="Standard">
      <style:text-properties officeooo:rsid="00104e56" officeooo:paragraph-rsid="00104e56"/>
    </style:style>
    <style:style style:name="T1" style:family="text">
      <style:text-properties officeooo:rsid="001074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7 errors</text:p>
      <text:p text:style-name="P1"/>
      <text:p text:style-name="P1">number 80: median not pulled</text:p>
      <text:p text:style-name="P1"/>
      <text:p text:style-name="P2">number 99: median not pulled nor IQR - was this correct in previous versions (eg v6)?</text:p>
      <text:p text:style-name="P2"/>
      <text:p text:style-name="P2">number 3<text:span text:style-name="T1">, 90</text:span>: pulled n as age category</text:p>
      <text:p text:style-name="P2"/>
      <text:p text:style-name="P2">number 20: range not pulled for group 2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0T08:04:35.413000000</meta:creation-date>
    <dc:date>2026-06-10T08:16:34.537000000</dc:date>
    <meta:editing-duration>PT1M50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5" meta:word-count="39" meta:character-count="199" meta:non-whitespace-character-count="165"/>
  </office:meta>
</office:document-meta>
</file>