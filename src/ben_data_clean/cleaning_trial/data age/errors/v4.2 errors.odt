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5d30" officeooo:paragraph-rsid="00045d30"/>
    </style:style>
    <style:style style:name="P2" style:family="paragraph" style:parent-style-name="Standard">
      <style:text-properties officeooo:rsid="0004c0c8" officeooo:paragraph-rsid="0004c0c8"/>
    </style:style>
    <style:style style:name="P3" style:family="paragraph" style:parent-style-name="Standard">
      <style:text-properties officeooo:rsid="00086b5a" officeooo:paragraph-rsid="0004c0c8"/>
    </style:style>
    <style:style style:name="P4" style:family="paragraph" style:parent-style-name="Standard">
      <style:text-properties officeooo:rsid="00086b5a" officeooo:paragraph-rsid="00086b5a"/>
    </style:style>
    <style:style style:name="P5" style:family="paragraph" style:parent-style-name="Standard">
      <style:text-properties officeooo:rsid="0009e1f9" officeooo:paragraph-rsid="0009e1f9"/>
    </style:style>
    <style:style style:name="P6" style:family="paragraph" style:parent-style-name="Standard">
      <style:text-properties officeooo:rsid="0009f49c" officeooo:paragraph-rsid="0009f49c"/>
    </style:style>
    <style:style style:name="P7" style:family="paragraph" style:parent-style-name="Standard">
      <style:text-properties officeooo:rsid="000b3335" officeooo:paragraph-rsid="000b3335"/>
    </style:style>
    <style:style style:name="T1" style:family="text">
      <style:text-properties officeooo:rsid="00069f4b"/>
    </style:style>
    <style:style style:name="T2" style:family="text">
      <style:text-properties officeooo:rsid="00086b5a"/>
    </style:style>
    <style:style style:name="T3" style:family="text">
      <style:text-properties officeooo:rsid="0009e1f9"/>
    </style:style>
    <style:style style:name="T4" style:family="text">
      <style:text-properties officeooo:rsid="000b33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4.2</text:p>
      <text:p text:style-name="P1"/>
      <text:p text:style-name="P1">overall IQR no range column</text:p>
      <text:p text:style-name="P1"/>
      <text:p text:style-name="P1">number 1<text:span text:style-name="T2">, </text:span><text:span text:style-name="T3">14, 16, 17, </text:span><text:span text:style-name="T2">19, </text:span><text:span text:style-name="T3">80, 86</text:span>: median not pulled</text:p>
      <text:p text:style-name="P1"/>
      <text:p text:style-name="P2">number 2, 8<text:span text:style-name="T2">, 18</text:span><text:span text:style-name="T3">, 93</text:span>: mean pulled into SD<text:span text:style-name="T3"> and not into mean</text:span></text:p>
      <text:p text:style-name="P2"/>
      <text:p text:style-name="P2">number 12: IQR value in <text:span text:style-name="T1">SD</text:span><text:span text:style-name="T3"> (as no column)</text:span></text:p>
      <text:p text:style-name="P3"/>
      <text:p text:style-name="P5">number 79: mean duplicated value in SD</text:p>
      <text:p text:style-name="P4"/>
      <text:p text:style-name="P4">number 22, 23, 26: overal dispersion not specified (yet reported) but flagged as not specified</text:p>
      <text:p text:style-name="P4"/>
      <text:p text:style-name="P5">number 71: not identified subgroups and not reported in them</text:p>
      <text:p text:style-name="P5"/>
      <text:p text:style-name="P5">number 84: SD not pulled</text:p>
      <text:p text:style-name="P5"/>
      <text:p text:style-name="P5">number 99: median not pulled</text:p>
      <text:p text:style-name="P5"/>
      <text:p text:style-name="P5">number 102: median not pulled and IQR not pulled but probably because error in cell</text:p>
      <text:p text:style-name="P5"/>
      <text:p text:style-name="P6">number 3: corrctly identified group names and dispersion type and number; stated average not reportd but was reported (yet unspecified) and no average pulled. NOTE the n is included (n=...) which we can ignore if this helps.</text:p>
      <text:p text:style-name="P6"/>
      <text:p text:style-name="P6">number 6<text:span text:style-name="T4">, 92</text:span>: identified as having subgroups when it did not, and thus very erroneous.</text:p>
      <text:p text:style-name="P6"/>
      <text:p text:style-name="P6">number 10: did not identify name of group 1, did identify median but did not pull value; placed IQR for group 2 into unspecified range (yet it had been spceified - by the key at the start - as IQR).</text:p>
      <text:p text:style-name="P6"/>
      <text:p text:style-name="P6">number 15: correctly identified groups and balues for each group - however, placed all as unspecified (perhaps because key was trimmed?)</text:p>
      <text:p text:style-name="P6"/>
      <text:p text:style-name="P6">number 20: did not identify name of group 1 but did of group 2; identified average type for group 1 but did not pull value; for group 2, did not correctly identify type of average, nor pull (or type) dispersion.</text:p>
      <text:p text:style-name="P6"/>
      <text:p text:style-name="P6">number 50: for group 2, incorrectly identified as average not reported but it was.</text:p>
      <text:p text:style-name="P6"/>
      <text:p text:style-name="P6">number 56: for group 1, average value did not pull; for group 2, incorrectly identified as average not reported but it was.</text:p>
      <text:p text:style-name="P6"/>
      <text:p text:style-name="P6">number 69: all correct except did not identify group names</text:p>
      <text:p text:style-name="P6"/>
      <text:p text:style-name="P6">number 75: correctly identified group names; average was identified in original cell (median) but pulled as unspecified; dispersion was present in original cell (IQR) but stated as not reported. - perhaps because of loss in trim?</text:p>
      <text:p text:style-name="P6"/>
      <text:p text:style-name="P7">number 82: very incorrect; group 1 name pulled correctly; that is all.</text:p>
      <text:p text:style-name="P7"/>
      <text:p text:style-name="P7">number 90: incorrectly stated average not reported for both groups, and neither value pulled</text:p>
      <text:p text:style-name="P7"><text:soft-page-break/>number 108: for group 1, mean not pulled and IQR not pulled (no coloumn for IQR). for group 2 incorrectly stated no dispersion identified, and incorrectly identified average type</text:p>
      <text:p text:style-name="P7"/>
      <text:p text:style-name="P7"/>
      <text:p text:style-name="P7"/>
      <text:p text:style-name="P7">We need a column for IQR when it is reported as a value not as UQR and LQR. Also for range (absolute), and range_unspecified (when bounds are not given but the type of range (i.e. SD, IQR, range) is not specified).</text:p>
      <text:p text:style-name="P7"/>
      <text:p text:style-name="P7">I suspect some errors with groups are to do with the key being stated at the start, and maybe lost in some trim function?</text:p>
      <text:p text:style-name="P7"/>
      <text:p text:style-name="P7">Also could we have a check that if there are numbers in cell not pulled through into row, then flag as potentially having a group?</text:p>
      <text:p text:style-name="P6"/>
      <text:p text:style-name="P5"><text:span text:style-name="T4">P</text:span>erhaps we <text:span text:style-name="T4">also </text:span>need a flag <text:span text:style-name="T4">column </text:span>for <text:span text:style-name="T4">specific </text:span>errors <text:span text:style-name="T4">in the initial age column, </text:span>(eg UR &gt; LR), (eg<text:span text:style-name="T4"> stating </text:span>~) (eg <text:span text:style-name="T4">stating </text:span>IQR with +/-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9T12:58:39.144000000</meta:creation-date>
    <dc:date>2026-06-09T14:46:12.298000000</dc:date>
    <meta:editing-duration>PT1H16M21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7" meta:word-count="503" meta:character-count="2796" meta:non-whitespace-character-count="2320"/>
  </office:meta>
</office:document-meta>
</file>